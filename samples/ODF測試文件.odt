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中華民國桃園縣政府 函</text:p>
      <text:p>發文日期：民國一一三年五月十五日</text:p>
      <text:p>發文字號：府教字第1130012345號</text:p>
      <text:p/>
      <text:p>主旨：申請辦理「全國中學生科學競賽」經費補助，請核示。</text:p>
      <text:p/>
      <text:p>說明：</text:p>
      <text:p>一、依據教育部113年度科學教育推動計畫辦理。</text:p>
      <text:p>二、申請人：王建國</text:p>
      <text:p>    身分證統一編號 B123456780</text:p>
      <text:p>    聯絡電話 (02)2345-6789</text:p>
      <text:p>    手機 0912-345-678</text:p>
      <text:p>    電子郵件 wang.jianguo@example.com</text:p>
      <text:p>三、申請人出生日期為民國七十五年三月二十日，現任職於台北市立第一高級中學，擔任教務主任一職。</text:p>
      <text:p>四、本案聯絡地址為台北市中正區重慶南路一段122號5樓。</text:p>
      <text:p>五、共同申請人為該校資訊科 林雅婷 老師，身分證字號 F234567891，手機 0923-456-789。</text:p>
      <text:p>六、團隊指導學生包含三年級陳同學及二年級黃同學，相關個人資料詳見附件名冊。</text:p>
      <text:p>七、本案相關費用預算表已檢附於附件，預計補助金額請參照附件文件。</text:p>
      <text:p>八、聯絡助理：張明遠，聯絡電話 0934-567-890，電子郵件 chang@school.edu.tw。</text:p>
      <text:p/>
      <text:p>正本：教育部</text:p>
      <text:p>副本：台北市立第一高級中學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