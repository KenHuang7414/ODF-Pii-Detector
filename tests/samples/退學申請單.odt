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h text:outline-level="1">國立中山高級中學 學生申請退學單</text:h>
      <text:p/>
      <text:p>受理單位：教務處註冊組</text:p>
      <text:p>文件編號：113學年度退字第0456號</text:p>
      <text:p/>
      <text:h text:outline-level="2">一、學生基本資料</text:h>
      <text:p>姓名：李雅婷</text:p>
      <text:p>學號：S1130412</text:p>
      <text:p>身分證統一編號：A287654325</text:p>
      <text:p>出生日期：民國九十一年九月九日</text:p>
      <text:p>班級：二年三班</text:p>
      <text:p>戶籍地址：高雄市左營區明誠二路78號3樓</text:p>
      <text:p>聯絡電話：(07)345-6789</text:p>
      <text:p>行動電話：0922-333-444</text:p>
      <text:p>電子郵件：li.yating@example.com</text:p>
      <text:p/>
      <text:h text:outline-level="2">二、申請事由</text:h>
      <text:p>因家庭因素需轉往戶籍地就近就學，特此申請退學，</text:p>
      <text:p>並轉學至高雄市立左營高級中學。</text:p>
      <text:p/>
      <text:h text:outline-level="2">三、家長／監護人資料</text:h>
      <text:p>姓名：李建明（父）</text:p>
      <text:p>身分證統一編號：A102345674</text:p>
      <text:p>聯絡電話：0911-222-333</text:p>
      <text:p>與學生關係：父女</text:p>
      <text:p/>
      <text:h text:outline-level="2">四、導師意見</text:h>
      <text:p>導師：張淑芬</text:p>
      <text:p>意見：該生在校表現良好，因家庭因素申請退學，</text:p>
      <text:p>已與家長確認並同意辦理，無不良紀錄。</text:p>
      <text:p/>
      <text:h text:outline-level="2">五、簽核</text:h>
      <text:p>導師簽章：張淑芬</text:p>
      <text:p>教務主任簽章：陳明哲</text:p>
      <text:p>校長簽章：王校長</text:p>
      <text:p/>
      <text:p>申請日期：2026年6月1日</text:p>
      <text:p>聯絡人：註冊組黃先生，分機 231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2.8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