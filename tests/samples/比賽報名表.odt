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h text:outline-level="1">2026年全國中學生程式設計競賽 報名表</text:h>
      <text:p/>
      <text:p>報名類別：高中組 / 團體賽</text:p>
      <text:p>隊伍名稱：演算法戰隊</text:p>
      <text:p/>
      <text:h text:outline-level="2">一、隊長資料</text:h>
      <text:p>姓名：陳柏宇</text:p>
      <text:p>身分證統一編號：A223456781</text:p>
      <text:p>出生年月日：民國九十年五月十二日</text:p>
      <text:p>聯絡電話：(04)2345-1234</text:p>
      <text:p>手機：0933-222-111</text:p>
      <text:p>電子郵件：chen.poyu@example.com</text:p>
      <text:p>就讀學校：國立台中第一高級中學</text:p>
      <text:p>通訊地址：台中市北區三民路三段129號</text:p>
      <text:p/>
      <text:h text:outline-level="2">二、隊員資料</text:h>
      <text:p>隊員一　姓名：許○芯　身分證號：B187654324</text:p>
      <text:p><text:s text:c="9"/>出生日期：2009/11/03</text:p>
      <text:p><text:s text:c="9"/>聯絡電話：0966-888-777</text:p>
      <text:p/>
      <text:p>隊員二　姓名：吳宗翰　身分證號：C223456783</text:p>
      <text:p><text:s text:c="9"/>出生日期：民國九十八年八月八日</text:p>
      <text:p><text:s text:c="9"/>聯絡電話：0955-444-333</text:p>
      <text:p/>
      <text:h text:outline-level="2">三、指導教師</text:h>
      <text:p>指導老師：林志強，現任教於國立台中第一高級中學資訊科，</text:p>
      <text:p>聯絡方式：林老師辦公室電話 (04)2345-6789，</text:p>
      <text:p>Email：lin.chihchiang@example.com。</text:p>
      <text:p/>
      <text:h text:outline-level="2">四、備註</text:h>
      <text:p>本隊伍曾於民國一一二年參加同項競賽，由王副校長推薦參賽。</text:p>
      <text:p>如有資料異動，請聯繫承辦人黃小姐，分機 1234。</text:p>
      <text:p/>
      <text:p>填表人：陳柏宇</text:p>
      <text:p>填表日期：2026年3月10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