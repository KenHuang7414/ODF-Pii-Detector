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T1" style:family="text">
      <style:text-properties officeooo:rsid="00174c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中華民國桃園縣政府 函</text:p>
      <text:p text:style-name="Standard"/>
      <text:p text:style-name="Standard">發文日期：民國一一三年五月十五日</text:p>
      <text:p text:style-name="Standard">發文字號：府教字第1130012345號</text:p>
      <text:p text:style-name="Standard"/>
      <text:p text:style-name="Standard">主旨：申請辦理「全國中學生科學競賽」經費補助，請核示。</text:p>
      <text:p text:style-name="Standard"/>
      <text:p text:style-name="Standard">說明：</text:p>
      <text:p text:style-name="Standard"/>
      <text:p text:style-name="Standard">一、依據教育部113年度科學教育推動計畫辦理。</text:p>
      <text:p text:style-name="Standard"/>
      <text:p text:style-name="Standard">二、申請人：王建國<text:line-break/><text:tab/>身分證統一編號 A123<text:span text:style-name="T1">456789<text:line-break/><text:tab/></text:span>聯絡電話 (02)2345-6789<text:line-break/><text:tab/>手機 0912-345-678<text:line-break/><text:tab/>電子郵件wang.jianguo@example.com。</text:p>
      <text:p text:style-name="Standard"/>
      <text:p text:style-name="Standard">三、申請人出生日期為民國七十五年三月二十日，現任職於台北市立第一高級中學，擔任教務主任一職。</text:p>
      <text:p text:style-name="Standard"/>
      <text:p text:style-name="Standard">四、本案聯絡地址為台北市中正區重慶南路一段122號5樓。</text:p>
      <text:p text:style-name="Standard"/>
      <text:p text:style-name="Standard">五、共同申請人為該校資訊科 林雅婷 老師<text:line-break/><text:tab/>身分證號B234567890<text:line-break/><text:tab/>出生日期1980/07/15<text:line-break/><text:tab/>連絡電話0987-654-321。</text:p>
      <text:p text:style-name="Standard"/>
      <text:p text:style-name="Standard">六、團隊指導學生包含三年級陳同學及二年級黃同學，</text:p>
      <text:p text:style-name="Standard"><text:s text:c="4"/><text:tab/>相關個人資料詳見附件名冊。</text:p>
      <text:p text:style-name="Standard"/>
      <text:p text:style-name="Standard">七、檢附文件：</text:p>
      <text:p text:style-name="Standard"><text:s text:c="4"/>（一）經費預算表</text:p>
      <text:p text:style-name="Standard"><text:s text:c="4"/>（二）參賽計畫書</text:p>
      <text:p text:style-name="Standard"><text:s text:c="4"/>（三）指導老師證明文件</text:p>
      <text:p text:style-name="Standard"/>
      <text:p text:style-name="Standard">正本：教育部</text:p>
      <text:p text:style-name="Standard">副本：本府教育局、台北市立第一高級中學</text:p>
      <text:p text:style-name="Standard"/>
      <text:p text:style-name="Standard">校長 張明遠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6:30:43.631018600</meta:creation-date>
    <dc:date>2026-06-15T16:38:05.469436300</dc:date>
    <meta:editing-duration>PT5M19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9" meta:word-count="326" meta:character-count="461" meta:non-whitespace-character-count="423"/>
  </office:meta>
</office:document-meta>
</file>